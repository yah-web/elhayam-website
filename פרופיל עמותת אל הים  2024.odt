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833in" fo:line-height="100%" style:page-number="1"/>
    </style:style>
    <style:style style:name="T10" style:parent-style-name="גופןברירתהמחדלשלפיסקה" style:family="text">
      <style:text-properties fo:color="#4472C4" fo:language="he" fo:country="IL" style:language-complex="he" style:country-complex="IL"/>
    </style:style>
    <style:style style:name="P11" style:parent-style-name="Standard" style:family="paragraph">
      <style:paragraph-properties fo:text-align="center" fo:margin-bottom="0.0833in" fo:line-height="100%"/>
      <style:text-properties fo:text-shadow="0in 0.0277in 0.0416in #6E747A" fo:color="#4472C4" style:text-underline-type="single" style:text-underline-style="solid" style:text-underline-width="auto" style:text-underline-mode="continuous" style:language-complex="he" style:country-complex="IL"/>
    </style:style>
    <style:style style:name="P12" style:parent-style-name="Standard" style:family="paragraph">
      <style:paragraph-properties fo:text-align="center" fo:margin-bottom="0.0833in" fo:line-height="100%" fo:background-color="#FFFFFF"/>
    </style:style>
    <style:style style:name="T13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23pt" style:font-size-asian="23pt" style:font-size-complex="23pt" style:text-underline-type="single" style:text-underline-style="solid" style:text-underline-width="auto" style:text-underline-mode="continuous" style:language-complex="he" style:country-complex="IL"/>
    </style:style>
    <style:style style:name="P14" style:parent-style-name="Standard" style:family="paragraph">
      <style:paragraph-properties fo:text-align="center" fo:margin-bottom="0.0833in" fo:line-height="100%" fo:background-color="#FFFFFF"/>
      <style:text-properties fo:text-shadow="0in 0.0277in 0.0416in #6E747A" fo:color="#4472C4"/>
    </style:style>
    <style:style style:name="P15" style:parent-style-name="Standard" style:family="paragraph">
      <style:paragraph-properties fo:text-align="center" fo:margin-bottom="0.0833in" fo:line-height="100%" fo:background-color="#FFFFFF"/>
    </style:style>
    <style:style style:name="T16" style:parent-style-name="גופןברירתהמחדלשלפיסקה" style:family="text">
      <style:text-properties style:font-name="Calibri" style:font-name-asian="Calibri" style:font-name-complex="Calibri" fo:font-weight="bold" style:font-weight-asian="bold" style:font-weight-complex="bold" fo:text-shadow="0in 0.0277in 0.0416in #6E747A" fo:font-size="14pt" style:font-size-asian="14pt" style:font-size-complex="14pt" fo:background-color="#FFFF00" style:language-complex="he" style:country-complex="IL"/>
    </style:style>
    <style:style style:name="T17" style:parent-style-name="גופןברירתהמחדלשלפיסקה" style:family="text">
      <style:text-properties style:font-name="Calibri" style:font-name-asian="Calibri" style:font-name-complex="Calibri" fo:font-weight="bold" style:font-weight-asian="bold" style:font-weight-complex="bold" fo:text-shadow="0in 0.0277in 0.0416in #6E747A" fo:font-size="14pt" style:font-size-asian="14pt" style:font-size-complex="14pt" fo:background-color="#FFFF00" style:language-complex="he" style:country-complex="IL"/>
    </style:style>
    <style:style style:name="T18" style:parent-style-name="גופןברירתהמחדלשלפיסקה" style:family="text">
      <style:text-properties style:font-name="Calibri" style:font-name-asian="Calibri" style:font-name-complex="Calibri" fo:font-weight="bold" style:font-weight-asian="bold" style:font-weight-complex="bold" fo:text-shadow="0in 0.0277in 0.0416in #6E747A" fo:font-size="14pt" style:font-size-asian="14pt" style:font-size-complex="14pt" fo:background-color="#FFFF00" style:language-complex="he" style:country-complex="IL"/>
    </style:style>
    <style:style style:name="T19" style:parent-style-name="גופןברירתהמחדלשלפיסקה" style:family="text">
      <style:text-properties style:font-name="Calibri" style:font-name-asian="Calibri" style:font-name-complex="Calibri" fo:font-weight="bold" style:font-weight-asian="bold" style:font-weight-complex="bold" fo:text-shadow="0in 0.0277in 0.0416in #6E747A" fo:font-size="14pt" style:font-size-asian="14pt" style:font-size-complex="14pt" fo:background-color="#FFFF00" style:language-complex="he" style:country-complex="IL"/>
    </style:style>
    <style:style style:name="T20" style:parent-style-name="גופןברירתהמחדלשלפיסקה" style:family="text">
      <style:text-properties style:font-name="Calibri" style:font-name-asian="Calibri" style:font-name-complex="Calibri" fo:font-weight="bold" style:font-weight-asian="bold" style:font-weight-complex="bold" fo:text-shadow="0in 0.0277in 0.0416in #6E747A" fo:font-size="14pt" style:font-size-asian="14pt" style:font-size-complex="14pt" fo:background-color="#FFFF00" style:language-complex="he" style:country-complex="IL"/>
    </style:style>
    <style:style style:name="T21" style:parent-style-name="גופןברירתהמחדלשלפיסקה" style:family="text">
      <style:text-properties style:font-name="Calibri" style:font-name-asian="Calibri" style:font-name-complex="Calibri" fo:font-weight="bold" style:font-weight-asian="bold" style:font-weight-complex="bold" fo:text-shadow="0in 0.0277in 0.0416in #6E747A" fo:font-size="14pt" style:font-size-asian="14pt" style:font-size-complex="14pt" fo:background-color="#FFFF00" style:language-complex="he" style:country-complex="IL"/>
    </style:style>
    <style:style style:name="T22" style:parent-style-name="גופןברירתהמחדלשלפיסקה" style:family="text">
      <style:text-properties style:font-name="Calibri" style:font-name-asian="Calibri" style:font-name-complex="Calibri" fo:font-weight="bold" style:font-weight-asian="bold" style:font-weight-complex="bold" fo:text-shadow="0in 0.0277in 0.0416in #6E747A" fo:font-size="14pt" style:font-size-asian="14pt" style:font-size-complex="14pt" fo:background-color="#FFFF00" style:language-complex="he" style:country-complex="IL"/>
    </style:style>
    <style:style style:name="T23" style:parent-style-name="גופןברירתהמחדלשלפיסקה" style:family="text">
      <style:text-properties style:font-name="Calibri" style:font-name-asian="Calibri" style:font-name-complex="Calibri" fo:font-weight="bold" style:font-weight-asian="bold" style:font-weight-complex="bold" fo:text-shadow="0in 0.0277in 0.0416in #6E747A" fo:font-size="14pt" style:font-size-asian="14pt" style:font-size-complex="14pt" fo:background-color="#FFFF00" style:language-complex="he" style:country-complex="IL"/>
    </style:style>
    <style:style style:name="T24" style:parent-style-name="גופןברירתהמחדלשלפיסקה" style:family="text">
      <style:text-properties style:font-name="Calibri" style:font-name-asian="Calibri" style:font-name-complex="Calibri" fo:font-weight="bold" style:font-weight-asian="bold" style:font-weight-complex="bold" fo:text-shadow="0in 0.0277in 0.0416in #6E747A" fo:font-size="14pt" style:font-size-asian="14pt" style:font-size-complex="14pt" fo:background-color="#FFFF00" style:language-complex="he" style:country-complex="IL"/>
    </style:style>
    <style:style style:name="P25" style:parent-style-name="Standard" style:family="paragraph">
      <style:paragraph-properties fo:text-align="center" fo:margin-bottom="0.0833in" fo:line-height="100%" fo:background-color="#FFFFFF"/>
    </style:style>
    <style:style style:name="T26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27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28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29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30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31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32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33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34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35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6" style:parent-style-name="רגיל" style:family="paragraph">
      <style:paragraph-properties fo:text-align="center" fo:background-color="#FFFFFF"/>
      <style:text-properties style:font-name="Calibri" style:font-name-asian="Calibri" style:font-name-complex="Calibri" style:font-weight-complex="bold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37" style:parent-style-name="רגיל" style:family="paragraph">
      <style:paragraph-properties fo:text-align="center"/>
      <style:text-properties style:font-name="Calibri" style:font-name-asian="Calibri" style:font-name-complex="Calibri" style:font-weight-complex="bold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38" style:parent-style-name="רגיל" style:family="paragraph">
      <style:paragraph-properties fo:text-align="center"/>
      <style:text-properties style:font-name="Calibri" style:font-name-asian="Calibri" style:font-name-complex="Calibri" style:font-weight-complex="bold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39" style:parent-style-name="רגיל" style:family="paragraph">
      <style:paragraph-properties fo:text-align="center"/>
      <style:text-properties style:font-name="Calibri" style:font-name-asian="Calibri" style:font-name-complex="Calibri" style:font-weight-complex="bold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40" style:parent-style-name="רגיל" style:family="paragraph">
      <style:paragraph-properties fo:text-align="center"/>
    </style:style>
    <style:style style:name="T41" style:parent-style-name="גופןברירתהמחדלשלפיסקה" style:family="text">
      <style:text-properties style:font-name="Calibri" style:font-name-asian="Calibri" style:font-name-complex="Calibri" style:font-weight-complex="bold" fo:color="#4472C4" fo:font-size="14pt" style:font-size-asian="14pt" style:font-size-complex="14pt" fo:background-color="#FFFF00" fo:language="he" fo:country="IL" style:language-complex="he" style:country-complex="IL"/>
    </style:style>
    <style:style style:name="P42" style:parent-style-name="Standard" style:family="paragraph">
      <style:paragraph-properties fo:text-align="center" fo:margin-bottom="0.0833in" fo:line-height="100%"/>
      <style:text-properties fo:text-shadow="0in 0.0277in 0.0416in #6E747A" fo:color="#4472C4" style:text-underline-type="single" style:text-underline-style="solid" style:text-underline-width="auto" style:text-underline-mode="continuous" style:language-complex="he" style:country-complex="IL"/>
    </style:style>
    <style:style style:name="P43" style:parent-style-name="רגיל" style:family="paragraph">
      <style:paragraph-properties fo:text-align="center"/>
      <style:text-properties style:font-name="Calibri" style:font-name-asian="Calibri" style:font-name-complex="Calibri" style:font-weight-complex="bold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44" style:parent-style-name="רגיל" style:family="paragraph">
      <style:text-properties style:font-name="Calibri" style:font-name-asian="Calibri" style:font-name-complex="Calibri" style:font-weight-complex="bold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45" style:parent-style-name="רגיל" style:family="paragraph">
      <style:paragraph-properties fo:text-align="center"/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46" style:parent-style-name="רגיל" style:family="paragraph">
      <style:paragraph-properties fo:text-align="center"/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47" style:parent-style-name="רגיל" style:family="paragraph">
      <style:paragraph-properties fo:text-align="center"/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48" style:parent-style-name="רגיל" style:family="paragraph">
      <style:paragraph-properties fo:text-align="center"/>
    </style:style>
    <style:style style:name="T49" style:parent-style-name="גופןברירתהמחדלשלפיסקה" style:family="text">
      <style:text-properties style:font-name-asian="Times New Roman" style:font-name-complex="Arial" style:font-weight-complex="bold" fo:color="#4472C4" fo:font-size="12pt" style:font-size-asian="12pt" style:font-size-complex="12pt" fo:background-color="#FFFF00" fo:language="he" fo:country="IL" style:language-asian="en" style:country-asian="US" style:language-complex="he" style:country-complex="IL"/>
    </style:style>
    <style:style style:name="P50" style:parent-style-name="Standard" style:family="paragraph">
      <style:paragraph-properties fo:text-align="center" fo:margin-bottom="0.0833in" fo:line-height="100%"/>
      <style:text-properties fo:text-shadow="0in 0.0277in 0.0416in #6E747A" fo:color="#4472C4" style:text-underline-type="single" style:text-underline-style="solid" style:text-underline-width="auto" style:text-underline-mode="continuous" style:language-complex="he" style:country-complex="IL"/>
    </style:style>
    <style:style style:name="P51" style:parent-style-name="רגיל" style:family="paragraph">
      <style:paragraph-properties fo:text-align="center"/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52" style:parent-style-name="גופןברירתהמחדלשלפיסקה" style:family="text">
      <style:text-properties fo:language="he" fo:country="IL"/>
    </style:style>
    <style:style style:name="P53" style:parent-style-name="רגיל" style:family="paragraph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54" style:parent-style-name="רגיל" style:family="paragraph">
      <style:paragraph-properties fo:text-align="center"/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55" style:parent-style-name="Standard" style:family="paragraph">
      <style:paragraph-properties fo:text-align="center" fo:margin-bottom="0.0833in" fo:line-height="100%"/>
      <style:text-properties fo:text-shadow="0in 0.0277in 0.0416in #6E747A" fo:color="#4472C4" style:text-underline-type="single" style:text-underline-style="solid" style:text-underline-width="auto" style:text-underline-mode="continuous" style:language-complex="he" style:country-complex="IL"/>
    </style:style>
    <style:style style:name="P56" style:parent-style-name="Standard" style:family="paragraph">
      <style:paragraph-properties fo:text-align="center" fo:margin-bottom="0.0833in" fo:line-height="100%"/>
      <style:text-properties fo:text-shadow="0in 0.0277in 0.0416in #6E747A" fo:color="#4472C4" style:text-underline-type="single" style:text-underline-style="solid" style:text-underline-width="auto" style:text-underline-mode="continuous" style:language-complex="he" style:country-complex="IL"/>
    </style:style>
    <style:style style:name="P57" style:parent-style-name="Standard" style:family="paragraph">
      <style:paragraph-properties fo:text-align="center" fo:margin-bottom="0.0833in" fo:line-height="100%"/>
      <style:text-properties fo:text-shadow="0in 0.0277in 0.0416in #6E747A" fo:color="#4472C4" style:text-underline-type="single" style:text-underline-style="solid" style:text-underline-width="auto" style:text-underline-mode="continuous" style:language-complex="he" style:country-complex="IL"/>
    </style:style>
    <style:style style:name="P58" style:parent-style-name="פיסקתרשימה" style:list-style-name="LFO1" style:family="paragraph">
      <style:paragraph-properties fo:text-align="center"/>
    </style:style>
    <style:style style:name="T59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60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61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62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63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64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65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66" style:parent-style-name="פיסקתרשימה" style:family="paragraph">
      <style:paragraph-properties fo:text-align="center"/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67" style:parent-style-name="פיסקתרשימה" style:family="paragraph">
      <style:paragraph-properties fo:text-align="center"/>
    </style:style>
    <style:style style:name="T68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69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70" style:parent-style-name="פיסקתרשימה" style:list-style-name="LFO1" style:family="paragraph">
      <style:paragraph-properties fo:text-align="center"/>
    </style:style>
    <style:style style:name="T71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72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73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74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75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76" style:parent-style-name="פיסקתרשימה" style:list-style-name="LFO1" style:family="paragraph">
      <style:paragraph-properties fo:text-align="center"/>
    </style:style>
    <style:style style:name="T77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78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79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80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81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82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83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84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85" style:parent-style-name="פיסקתרשימה" style:list-style-name="LFO1" style:family="paragraph">
      <style:paragraph-properties fo:text-align="center"/>
    </style:style>
    <style:style style:name="T86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87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88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89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90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91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92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93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94" style:parent-style-name="פיסקתרשימה" style:list-style-name="LFO1" style:family="paragraph">
      <style:paragraph-properties fo:text-align="center"/>
    </style:style>
    <style:style style:name="T95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96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97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98" style:parent-style-name="גופןברירתהמחדלשלפיסקה" style:family="text">
      <style:text-properties style:font-name-asian="Times New Roman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99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100" style:parent-style-name="פיסקתרשימה" style:list-style-name="LFO1" style:family="paragraph">
      <style:paragraph-properties fo:text-align="center"/>
    </style:style>
    <style:style style:name="T101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102" style:parent-style-name="פיסקתרשימה" style:list-style-name="LFO1" style:family="paragraph">
      <style:paragraph-properties fo:text-align="center"/>
    </style:style>
    <style:style style:name="T103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104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105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106" style:parent-style-name="פיסקתרשימה" style:family="paragraph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T107" style:parent-style-name="גופןברירתהמחדלשלפיסקה" style:family="text">
      <style:text-properties style:font-name-asian="Times New Roman" style:font-name-complex="Arial" style:font-weight-complex="bold" fo:text-shadow="0in 0.0277in 0.0416in #6E747A" fo:color="#4472C4" fo:font-size="12pt" style:font-size-asian="12pt" style:font-size-complex="12pt" fo:background-color="#FFFF00" style:language-asian="en" style:country-asian="US" style:language-complex="he" style:country-complex="IL"/>
    </style:style>
    <style:style style:name="P108" style:parent-style-name="רגיל" style:family="paragraph">
      <style:paragraph-properties style:writing-mode="lr-tb"/>
      <style:text-properties fo:text-shadow="0in 0.0277in 0.0416in #6E747A" fo:color="#4472C4"/>
    </style:style>
    <style:style style:name="P109" style:parent-style-name="Standard" style:family="paragraph">
      <style:paragraph-properties fo:text-align="center" fo:margin-bottom="0.0833in" fo:line-height="100%"/>
    </style:style>
    <style:style style:name="T110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11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12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13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14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15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16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17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18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19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20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21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22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23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24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25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26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27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28" style:parent-style-name="Standard" style:family="paragraph">
      <style:paragraph-properties fo:text-align="center" fo:margin-bottom="0.0833in" fo:line-height="100%"/>
    </style:style>
    <style:style style:name="T129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130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131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132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133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34" style:parent-style-name="Standard" style:list-style-name="LFO2" style:family="paragraph">
      <style:paragraph-properties fo:margin-bottom="0.0833in" fo:line-height="100%"/>
    </style:style>
    <style:style style:name="T135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36" style:parent-style-name="Standard" style:list-style-name="LFO2" style:family="paragraph">
      <style:paragraph-properties fo:margin-bottom="0.0833in" fo:line-height="100%"/>
    </style:style>
    <style:style style:name="T137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38" style:parent-style-name="Standard" style:list-style-name="LFO2" style:family="paragraph">
      <style:paragraph-properties fo:margin-bottom="0.0833in" fo:line-height="100%"/>
    </style:style>
    <style:style style:name="T139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40" style:parent-style-name="Standard" style:list-style-name="LFO2" style:family="paragraph">
      <style:paragraph-properties fo:margin-bottom="0.0833in" fo:line-height="100%"/>
    </style:style>
    <style:style style:name="T141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42" style:parent-style-name="Standard" style:list-style-name="LFO2" style:family="paragraph">
      <style:paragraph-properties fo:margin-bottom="0.0833in" fo:line-height="100%"/>
    </style:style>
    <style:style style:name="T143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44" style:parent-style-name="Standard" style:list-style-name="LFO2" style:family="paragraph">
      <style:paragraph-properties fo:margin-bottom="0.0833in" fo:line-height="100%"/>
    </style:style>
    <style:style style:name="T145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46" style:parent-style-name="Standard" style:list-style-name="LFO2" style:family="paragraph">
      <style:paragraph-properties fo:margin-bottom="0.0833in" fo:line-height="100%"/>
    </style:style>
    <style:style style:name="T147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48" style:parent-style-name="Standard" style:family="paragraph">
      <style:paragraph-properties fo:margin-bottom="0.0833in" fo:line-height="100%"/>
    </style:style>
    <style:style style:name="P149" style:parent-style-name="Standard" style:family="paragraph">
      <style:paragraph-properties fo:text-align="center" fo:margin-bottom="0.0833in" fo:line-height="100%"/>
    </style:style>
    <style:style style:name="T150" style:parent-style-name="גופןברירתהמחדלשלפיסקה" style:family="text">
      <style:text-properties style:font-name="Calibri" style:font-name-asian="Calibri" style:font-name-complex="Calibri" fo:font-weight="bold" style:font-weight-asian="bold" style:font-weight-complex="bold" fo:text-shadow="0in 0.0277in 0.0416in #6E747A" fo:color="#FF0000" fo:font-size="14pt" style:font-size-asian="14pt" style:font-size-complex="14pt" fo:background-color="#FFFF00" style:text-underline-type="single" style:text-underline-style="solid" style:text-underline-width="auto" style:text-underline-mode="continuous" style:language-complex="he" style:country-complex="IL"/>
    </style:style>
    <style:style style:name="P151" style:parent-style-name="Standard" style:family="paragraph">
      <style:paragraph-properties fo:margin-bottom="0.0833in" fo:line-height="100%"/>
      <style:text-properties fo:text-shadow="0in 0.0277in 0.0416in #6E747A" fo:color="#4472C4" style:language-complex="he" style:country-complex="IL"/>
    </style:style>
    <style:style style:name="P152" style:parent-style-name="Standard" style:family="paragraph">
      <style:paragraph-properties fo:text-align="center" fo:margin-bottom="0.0833in" fo:line-height="100%"/>
    </style:style>
    <style:style style:name="T153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54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55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56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57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58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59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60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61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62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/>
    </style:style>
    <style:style style:name="P163" style:parent-style-name="Standard" style:family="paragraph">
      <style:paragraph-properties fo:text-align="center" fo:margin-bottom="0.0833in" fo:line-height="100%"/>
    </style:style>
    <style:style style:name="T164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65" style:parent-style-name="Standard" style:family="paragraph">
      <style:paragraph-properties fo:text-align="center" fo:margin-bottom="0.0833in" fo:line-height="100%"/>
    </style:style>
    <style:style style:name="T166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67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68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169" style:parent-style-name="Standard" style:family="paragraph">
      <style:paragraph-properties fo:margin-bottom="0.0833in" fo:line-height="100%"/>
      <style:text-properties fo:text-shadow="0in 0.0277in 0.0416in #6E747A" fo:color="#4472C4"/>
    </style:style>
    <style:style style:name="P170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font-weight="bold" style:font-weight-asian="bold" style:font-weight-complex="bold" fo:text-shadow="0in 0.0277in 0.0416in #6E747A" fo:color="#4472C4" fo:font-size="14pt" style:font-size-asian="14pt" style:font-size-complex="14pt" style:language-complex="he" style:country-complex="IL"/>
    </style:style>
    <style:style style:name="P171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font-weight="bold" style:font-weight-asian="bold" style:font-weight-complex="bold" fo:text-shadow="0in 0.0277in 0.0416in #6E747A" fo:color="#4472C4" fo:font-size="14pt" style:font-size-asian="14pt" style:font-size-complex="14pt" style:language-complex="he" style:country-complex="IL"/>
    </style:style>
    <style:style style:name="P172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73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74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75" style:parent-style-name="Standard" style:family="paragraph">
      <style:paragraph-properties fo:text-align="center" fo:margin-bottom="0.0833in" fo:line-height="100%"/>
    </style:style>
    <style:style style:name="T176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77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178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179" style:parent-style-name="Standard" style:family="paragraph">
      <style:paragraph-properties fo:margin-bottom="0.0833in" fo:line-height="100%"/>
      <style:text-properties fo:text-shadow="0in 0.0277in 0.0416in #6E747A" fo:color="#4472C4"/>
    </style:style>
    <style:style style:name="P180" style:parent-style-name="Standard" style:family="paragraph">
      <style:paragraph-properties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/>
    </style:style>
    <style:style style:name="P181" style:parent-style-name="Standard" style:family="paragraph">
      <style:paragraph-properties fo:margin-bottom="0.0833in" fo:line-height="100%"/>
      <style:text-properties fo:text-shadow="0in 0.0277in 0.0416in #6E747A" fo:color="#4472C4"/>
    </style:style>
    <style:style style:name="P182" style:parent-style-name="Standard" style:family="paragraph">
      <style:paragraph-properties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/>
    </style:style>
    <style:style style:name="P183" style:parent-style-name="Standard" style:family="paragraph">
      <style:paragraph-properties fo:text-align="center" fo:margin-bottom="0.0833in" fo:line-height="100%"/>
    </style:style>
    <style:style style:name="T184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185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186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187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188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89" style:parent-style-name="Standard" style:family="paragraph">
      <style:paragraph-properties fo:margin-bottom="0.0833in" fo:line-height="100%"/>
      <style:text-properties fo:text-shadow="0in 0.0277in 0.0416in #6E747A" fo:color="#4472C4"/>
    </style:style>
    <style:style style:name="P190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font-weight="bold" style:font-weight-asian="bold" style:font-weight-complex="bold" fo:text-shadow="0in 0.0277in 0.0416in #6E747A" fo:color="#4472C4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191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92" style:parent-style-name="Standard" style:family="paragraph">
      <style:paragraph-properties fo:text-align="center" fo:margin-bottom="0.0833in" fo:line-height="100%"/>
      <style:text-properties fo:text-shadow="0in 0.0277in 0.0416in #6E747A" fo:color="#4472C4"/>
    </style:style>
    <style:style style:name="P193" style:parent-style-name="Standard" style:family="paragraph">
      <style:paragraph-properties fo:text-align="center" fo:margin-bottom="0.0833in" fo:line-height="100%"/>
    </style:style>
    <style:style style:name="T194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95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196" style:parent-style-name="Standard" style:family="paragraph">
      <style:paragraph-properties fo:text-align="center" fo:margin-bottom="0.0833in" fo:line-height="100%"/>
    </style:style>
    <style:style style:name="T197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98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199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200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T201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202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203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204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205" style:parent-style-name="Standard" style:family="paragraph">
      <style:paragraph-properties fo:text-align="center" fo:margin-bottom="0.0833in" fo:line-height="100%"/>
    </style:style>
    <style:style style:name="T206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207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208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209" style:parent-style-name="Standard" style:family="paragraph">
      <style:paragraph-properties fo:text-align="center" fo:margin-bottom="0.0833in" fo:line-height="100%"/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210" style:parent-style-name="Standard" style:family="paragraph">
      <style:paragraph-properties fo:text-align="center" fo:margin-bottom="0.0833in" fo:line-height="100%"/>
    </style:style>
    <style:style style:name="T211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fo:background-color="#FFFF00" style:language-complex="he" style:country-complex="IL"/>
    </style:style>
    <style:style style:name="P212" style:parent-style-name="Standard" style:family="paragraph">
      <style:paragraph-properties fo:text-align="center" fo:margin-bottom="0.0833in" fo:line-height="100%"/>
    </style:style>
    <style:style style:name="T213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214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215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216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217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T218" style:parent-style-name="גופןברירתהמחדלשלפיסקה" style:family="text">
      <style:text-properties style:font-name="Calibri" style:font-name-asian="Calibri" style:font-name-complex="Calibri" fo:text-shadow="0in 0.0277in 0.0416in #6E747A" fo:color="#4472C4" fo:font-size="14pt" style:font-size-asian="14pt" style:font-size-complex="14pt" style:language-complex="he" style:country-complex="IL"/>
    </style:style>
    <style:style style:name="P219" style:parent-style-name="Standard" style:family="paragraph">
      <style:paragraph-properties fo:text-align="end"/>
      <style:text-properties fo:text-shadow="0in 0.0277in 0.0416in #6E747A" fo:color="#4472C4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draw:fill="none" draw:stroke="none"/>
    </style:style>
  </office:automatic-styles>
  <office:body>
    <office:text text:use-soft-page-breaks="true">
      <text:p text:style-name="P1"><text:span text:style-name="T10"><draw:frame draw:style-name="a1" draw:name="תמונה 1" text:anchor-type="as-char" svg:x="0in" svg:y="0in" svg:width="3.02075in" svg:height="1.79877in" style:rel-width="scale" style:rel-height="scale"><draw:image xlink:href="media/image1.jpg" xlink:type="simple" xlink:show="embed" xlink:actuate="onLoad"/><svg:title/><svg:desc/></draw:frame></text:span></text:p>
      <text:p text:style-name="P11"><text:bookmark-start text:name="_Hlk168119124"/>תמונה מפרוייקט <text:s/>של עמותת אל הים נשים מחלימות ומתמודדדות ממחלת סרטן השד</text:p>
      <text:p text:style-name="P12"><text:bookmark-end text:name="_Hlk168119124"/><text:span text:style-name="T13">פרופיל עמותת אל -הים<text:s/></text:span></text:p>
      <text:p text:style-name="P14"/>
      <text:p text:style-name="P15"><text:span text:style-name="T16">עמותת</text:span><text:span text:style-name="T17"><text:s/></text:span><text:span text:style-name="T18"><text:s/>אל<text:s/></text:span><text:span text:style-name="T19">–</text:span><text:span text:style-name="T20"><text:s/>הים</text:span><text:span text:style-name="T21"><text:s text:c="2"/></text:span><text:span text:style-name="T22">ע"ר</text:span><text:span text:style-name="T23"><text:s/></text:span><text:span text:style-name="T24"><text:s/>580677094<text:s/></text:span></text:p>
      <text:p text:style-name="P25"><text:span text:style-name="T26">עמותת<text:s/></text:span><text:span text:style-name="T27">אל הים<text:s/></text:span><text:span text:style-name="T28">נוסדה</text:span><text:span text:style-name="T29"><text:s/></text:span><text:span text:style-name="T30">בשנת 2019<text:s/></text:span><text:span text:style-name="T31"><text:s/>כאשר ז</text:span><text:span text:style-name="T32">י</text:span><text:span text:style-name="T33">הינו הזדמנות נדירה לחבר ביו הקהילה של קר</text:span><text:span text:style-name="T34">י</text:span><text:span text:style-name="T35">ית חיים והסביבה ועולם המדהים של הים</text:span></text:p>
      <text:p text:style-name="P36">בחמשת השנים האחרונות העמותה שלנו מתמסרת לקהילה במתן חיבוק לכל מי שרק צריך בין אם חלק מקבוצה או כיחידים כולם<text:s/>מוזמנים באהבה</text:p>
      <text:p text:style-name="P37"/>
      <text:p text:style-name="P38">מטרת<text:s/>המרכז<text:s/><text:s/>הימי<text:s/>היא<text:s/>להעניק<text:s/>הפוגה<text:s/><text:s/>ממרוץ החיים האינטנסיבי<text:s/>שבו אין ביקורת ואין גבולות תוך<text:s/>כדי<text:s/><text:s/>נתינה<text:s/>אין סופית של<text:s/>מדריכים מקצועיים וחברי קהילה <text:s/>שהמכנה המשותף שלהם זהה למטרת העמותה וזה להנגיש לכולם את הים והריפוי <text:s/>שניתן לרפא דרכו<text:s/></text:p>
      <text:p text:style-name="P39">מה שמלווה את המרכז המיוחד הזה היא האנרגיה של כולם שבונה את המקום</text:p>
      <text:p text:style-name="P40"><text:span text:style-name="T41"><draw:frame draw:style-name="a2" draw:name="תמונה 3" text:anchor-type="as-char" svg:x="0in" svg:y="0in" svg:width="2.72209in" svg:height="1.81072in" style:rel-width="scale" style:rel-height="scale"><draw:image xlink:href="media/image2.jpeg" xlink:type="simple" xlink:show="embed" xlink:actuate="onLoad"/><svg:title/><svg:desc/></draw:frame></text:span></text:p>
      <text:p text:style-name="P42"><text:bookmark-start text:name="_Hlk168120073"/>תעודת הוקרה על פעילות עמותת אל הים לילדי עמותת גדולים מהחיים שנה חמישית לפעילות<text:s/></text:p>
      <text:p text:style-name="P43"><text:bookmark-end text:name="_Hlk168120073"/></text:p>
      <text:p text:style-name="P44"/>
      <text:p text:style-name="P45">כיום<text:s/>אנו<text:s/>רואים<text:s/>הזדמנות אדירה<text:s/>להרחיב את המשפחה לאחר שהקמנו וצמחנו ויש לנו את הזכות והיכולת<text:s/>לשלב<text:s/>אנשים נוספים<text:s/>הצריכים וגם זכאים<text:s/>מזהים<text:s/>לסל השיקום<text:s/>באווירה של פנאי ונחת במועדון הגלישה שלנו<text:s/></text:p>
      <text:p text:style-name="P46">אין לנו ספק שנוכל להעניק עבורם מקום של הפוגה ממירוץ החיים<text:s/></text:p>
      <text:p text:style-name="P47">נקודת אור מלאת אופטימיות<text:s/></text:p>
      <text:p text:style-name="P48"><text:span text:style-name="T49"><draw:frame draw:style-name="a3" draw:name="תמונה 5" text:anchor-type="as-char" svg:x="0in" svg:y="0in" svg:width="3.3904in" svg:height="2.26969in" style:rel-width="scale" style:rel-height="scale"><draw:image xlink:href="media/image3.jpeg" xlink:type="simple" xlink:show="embed" xlink:actuate="onLoad"/><svg:title/><svg:desc/></draw:frame></text:span></text:p>
      <text:p text:style-name="P50">תמונת פרויקט ילדי גדולים מהחיים</text:p>
      <text:p text:style-name="P51"/>
      <text:p text:style-name="רגיל"><text:span text:style-name="T52"><draw:frame draw:style-name="a4" draw:name="תמונה 1085342956" text:anchor-type="as-char" svg:x="0in" svg:y="0in" svg:width="6.16863in" svg:height="2.65368in" style:rel-width="scale" style:rel-height="scale"><draw:image xlink:href="media/image4.jpeg" xlink:type="simple" xlink:show="embed" xlink:actuate="onLoad"/><svg:title/><svg:desc/></draw:frame></text:span></text:p>
      <text:p text:style-name="P53"/>
      <text:soft-page-break/>
      <text:p text:style-name="P54">הפרויקטים<text:s/>שזכינו לקחת חלק עד היום<text:s/><text:s/>–</text:p>
      <text:p text:style-name="P55">מצורפים מכתבי תודה והוקרה על הפעילות<text:s/></text:p>
      <text:p text:style-name="P56"/>
      <text:p text:style-name="P57"/>
      <text:list text:style-name="LFO1" text:continue-numbering="true">
        <text:list-item>
          <text:p text:style-name="P58"><text:span text:style-name="T59">חיילים</text:span><text:span text:style-name="T60"><text:s/></text:span><text:span text:style-name="T61">מתמודדי נפש / פוסט</text:span><text:span text:style-name="T62"><text:s/></text:span><text:span text:style-name="T63">טראומה – מגיעים<text:s/></text:span><text:span text:style-name="T64">אלינו</text:span><text:span text:style-name="T65"><text:s/>לא דרך ארגון אלא עצמאית</text:span></text:p>
        </text:list-item>
      </text:list>
      <text:p text:style-name="P66">ומוצאים את המקום שמאוד עוזר להם להתמודדות עם הלחצים בחוץ</text:p>
      <text:p text:style-name="P67"><text:span text:style-name="T68">כחלק מהנגישות לים הם מצטרפים להיות מתנדבים עבור אחרים וכך אנחנו מנרמלים את מצבם מול האוכלוסיה ומשלבים<text:s/></text:span><text:span text:style-name="T69">בינהם</text:span></text:p>
      <text:list text:style-name="LFO1" text:continue-numbering="true">
        <text:list-item>
          <text:p text:style-name="P70"><text:span text:style-name="T71">חיילים</text:span><text:span text:style-name="T72"><text:s/></text:span><text:span text:style-name="T73">בודדים<text:s/></text:span><text:span text:style-name="T74">-<text:s/></text:span><text:span text:style-name="T75">מגיעים אלינו עצמאית</text:span></text:p>
        </text:list-item>
        <text:list-item>
          <text:p text:style-name="P76"><text:span text:style-name="T77">ילדים</text:span><text:span text:style-name="T78"><text:s/></text:span><text:span text:style-name="T79">מחלימים</text:span><text:span text:style-name="T80"><text:s/></text:span><text:span text:style-name="T81">ממחלת</text:span><text:span text:style-name="T82"><text:s/></text:span><text:span text:style-name="T83">הסרטן- שיתופי פעולה עם עמותת גדולים מהחיים</text:span><text:span text:style-name="T84"><text:s/>לאורך כל קיץ השנה החמישית לפעילות<text:s/></text:span></text:p>
        </text:list-item>
        <text:list-item>
          <text:p text:style-name="P85"><text:span text:style-name="T86">ילדי</text:span><text:span text:style-name="T87"><text:s/></text:span><text:span text:style-name="T88">רווחה</text:span><text:span text:style-name="T89"><text:s/></text:span><text:span text:style-name="T90">קריית</text:span><text:span text:style-name="T91"><text:s/></text:span><text:span text:style-name="T92">חיים יחד עם מרכז צ'ארנה</text:span><text:span text:style-name="T93"><text:s/>פעילות שוטפת לאורך כל השנה חוג שבועי לילדים ללא יכולת ואו ממשפחות קשות יום <text:s/></text:span></text:p>
        </text:list-item>
        <text:list-item>
          <text:p text:style-name="P94"><text:span text:style-name="T95">נוער</text:span><text:span text:style-name="T96"><text:s/></text:span><text:span text:style-name="T97">רווחה</text:span><text:span text:style-name="T98"><text:s/></text:span><text:span text:style-name="T99">חיפה - מיתר</text:span></text:p>
        </text:list-item>
        <text:list-item>
          <text:p text:style-name="P100"><text:span text:style-name="T101">ימי גיבוש ללוחמי חיל הים</text:span></text:p>
        </text:list-item>
        <text:list-item>
          <text:p text:style-name="P102"><text:span text:style-name="T103">"חרבות ברזל"<text:s/></text:span><text:span text:style-name="T104">–</text:span><text:span text:style-name="T105"><text:s/>מהיום הראשון ללחימה עמותת אל הים גייסה את עצמה למען המלחמה<text:s/></text:span></text:p>
        </text:list-item>
      </text:list>
      <text:p text:style-name="P106">הן באשר ללוחמים מצפון עד דרום כולל גיוס עס 70 א' שח ורכישות לחיילים לפי דרישה <text:s/>והן באשר למשפחות המפונות המגיעות אלינו בעלויות סימליות ולעיתים ללא עלות<text:s/></text:p>
      <text:p text:style-name="פיסקתרשימה"><text:span text:style-name="T107">בין היתר גם <text:s/>מחנה קייטנת גלישה פסח 24 <text:s/>אירחנו 11 משפחות מפונות ללא עלות <text:s/></text:span></text:p>
      <text:p text:style-name="P108"/>
      <text:p text:style-name="P109"><text:span text:style-name="T110">הגלישה<text:s/></text:span><text:span text:style-name="T111"><text:s/></text:span><text:span text:style-name="T112">הסביבה</text:span><text:span text:style-name="T113"><text:s/>הימית <text:s/>והמרכז הימי<text:s/></text:span><text:span text:style-name="T114">של עמותת אל<text:s/></text:span><text:span text:style-name="T115">–</text:span><text:span text:style-name="T116"><text:s/>הים<text:s/></text:span><text:span text:style-name="T117"><text:s/>בפרט ישמש <text:s/></text:span><text:span text:style-name="T118">לכלל האוכלוסיות באשר הן<text:s/></text:span><text:span text:style-name="T119"><text:s/>ככלי עזר <text:s/>עיקרי <text:s/>להתמודד פיזית ונפשית עם החיים בחוץ שיצאו מכאן עם בטחון עוצמות חוזקה ואנרגיות מחודשות ,הפוגה מהחיים <text:s/>ומהסטרס שבו הם נמצאים <text:s/>למקום של אופטימיות</text:span><text:span text:style-name="T120"><text:s/>שלווה</text:span><text:span text:style-name="T121"><text:s text:c="2"/>ותקווה</text:span></text:p>
      <text:p text:style-name="P122"/>
      <text:p text:style-name="P123">כיום לאחר שנים של פעילות ותרומה<text:s/>לקהילה החזון שלנו הוא להגיע לקהל רחב יותר על מנת לאפשר לכול אחד<text:s/>תמיכה<text:s/>ריפוי<text:s/>והפוגה<text:s/>מהקשיים<text:s/>שחלקנו מתמודדים עמם על בסיס יום יומי.</text:p>
      <text:p text:style-name="P124"/>
      <text:p text:style-name="P125"/>
      <text:p text:style-name="P126"/>
      <text:p text:style-name="P127"/>
      <text:soft-page-break/>
      <text:p text:style-name="P128"><text:span text:style-name="T129">אנו מצ</text:span><text:span text:style-name="T130">י</text:span><text:span text:style-name="T131">עים מגוון רחב של אפשרויות<text:s/></text:span><text:span text:style-name="T132">ושל<text:s/></text:span><text:span text:style-name="T133">סוגי הגלישה והחתירה אצלנו</text:span></text:p>
      <text:list text:style-name="LFO2" text:continue-numbering="true">
        <text:list-item>
          <text:p text:style-name="P134"><text:span text:style-name="T135">גלישת גלים</text:span></text:p>
        </text:list-item>
        <text:list-item>
          <text:p text:style-name="P136"><text:span text:style-name="T137">חתירה על סאפ</text:span></text:p>
        </text:list-item>
        <text:list-item>
          <text:p text:style-name="P138"><text:span text:style-name="T139">קייטסרפינג גלישה בעזרת עפיפון</text:span></text:p>
        </text:list-item>
        <text:list-item>
          <text:p text:style-name="P140"><text:span text:style-name="T141">ווינג גלישה בעזרת כנף של עפיפון</text:span></text:p>
        </text:list-item>
        <text:list-item>
          <text:p text:style-name="P142"><text:span text:style-name="T143">קאייקים__</text:span></text:p>
        </text:list-item>
        <text:list-item>
          <text:p text:style-name="P144"><text:span text:style-name="T145">סרף סקי קאייק אולימפי</text:span></text:p>
        </text:list-item>
        <text:list-item>
          <text:p text:style-name="P146"><text:span text:style-name="T147">שיעורי יוגה בחוף הים</text:span></text:p>
        </text:list-item>
      </text:list>
      <text:p text:style-name="P148"><draw:custom-shape svg:x="0in" svg:y="0in" svg:width="0.33333in" svg:height="0.33333in" draw:id="id1" draw:style-name="a5" draw:name="AutoShape 2" text:anchor-type="as-char"><svg:title/><svg:desc/><draw:enhanced-geometry draw:type="non-primitive" svg:viewBox="0 0 21600 21600" draw:enhanced-path="M 0 0 L 21600 0 21600 21600 0 21600 Z N"/></draw:custom-shape></text:p>
      <text:p text:style-name="P149"><text:span text:style-name="T150">מה שמוביל את <text:s/>עמותת אל - הים מתחילת דרכה <text:s/>להעניק לאנשים תקווה שהעולם יכול להיות טוב עבורם ושיש אנשים טובים באמצע הדרך</text:span></text:p>
      <text:p text:style-name="P151"/>
      <text:p text:style-name="P152"><text:span text:style-name="T153">כמטרה ברורה להנגיש את הספורט הימי לכולם ולא רק לקהל מסוים <text:s/>ההבנה מהיום הראשון להקמה ה</text:span><text:span text:style-name="T154">י</text:span><text:span text:style-name="T155">יתה</text:span><text:span text:style-name="T156"><text:s/></text:span><text:span text:style-name="T157">ערך המוסף ב</text:span><text:span text:style-name="T158">נגישות</text:span><text:span text:style-name="T159"><text:s/></text:span><text:span text:style-name="T160"><text:s/>בעלויות<text:s/></text:span><text:span text:style-name="T161">ולכן מהיום הראשון העמותה נגישה באירוח בשירות ובעלויות</text:span></text:p>
      <text:p text:style-name="P162"/>
      <text:p text:style-name="P163"><text:span text:style-name="T164">זה <text:s/>היופי במרכז הימי שהמגוון של הקהל הוא רבגוני <text:s/>בצורה יוצאת דופן ,</text:span></text:p>
      <text:p text:style-name="P165"><text:span text:style-name="T166">כל ילד/ילדה החל מגילאי 8+</text:span></text:p>
      <text:p text:style-name="P167">עד לגיל פרישה /הגיל השלישי <text:s/>כולם אצלנו לוקחים חלק כל אחד והחיבור שלו לים</text:p>
      <text:p text:style-name="P168"/>
      <text:p text:style-name="P169"/>
      <text:p text:style-name="P170">שיעורי הגלישה והחוגים המגוונים הם חלק<text:s/>מהקהילה<text:s/>המחבקת<text:s/>בעלת<text:s/>נתינה אין סופית.</text:p>
      <text:p text:style-name="P171">כולנו כאן למטרה אחת<text:s/>בלבד וזה פשוט<text:s/>לעשות<text:s/><text:s/>טוב.</text:p>
      <text:p text:style-name="P172"/>
      <text:p text:style-name="P173"/>
      <text:p text:style-name="P174"/>
      <text:p text:style-name="P175"><text:span text:style-name="T176">לאורך השנים הקהילה שלנו התרחבה והתגוונה <text:s/>והתמזגה לאיזור</text:span></text:p>
      <text:p text:style-name="P177">אף על פי קיומן של עוד שני מועדון גלישה באיזור</text:p>
      <text:p text:style-name="P178">מה שעמותת<text:s/>אל-<text:s/>הים מביאה יחד איתה<text:s/>לאיזור הוא מקום של שלווה<text:s/><text:s/>נתינה<text:s/>והפוגה.</text:p>
      <text:p text:style-name="P179"/>
      <text:p text:style-name="P180"/>
      <text:p text:style-name="P181"/>
      <text:p text:style-name="P182"/>
      <text:p text:style-name="P183"><text:span text:style-name="T184">לעמותה</text:span><text:span text:style-name="T185"><text:s/>דף פייסבוק ואינסטגרם שפונה לקהל רחב. יחד עם זאת גדילת הקהל שלנו מגיעה מפה לאוזן<text:s/></text:span><text:span text:style-name="T186">המפיצים</text:span><text:span text:style-name="T187"><text:s/>את האהבה והאחווה ברחבי הקהילה</text:span><text:span text:style-name="T188"><text:s/>ומחוצה לה</text:span></text:p>
      <text:p text:style-name="P189"/>
      <text:p text:style-name="P190">מצורפים <text:s/>מכתבי תודה והוקרה<text:s/><text:s/>לעמותה</text:p>
      <text:p text:style-name="P191"/>
      <text:p text:style-name="P192"/>
      <text:p text:style-name="P193"><text:span text:style-name="T194">המרכז הימי</text:span><text:span text:style-name="T195"><text:s/>שלנו ממקום באיזור מרכזי ונגיש.</text:span></text:p>
      <text:p text:style-name="P196"><text:span text:style-name="T197">וכולל<text:s/></text:span><text:span text:style-name="T198"><text:s/>מקומות ישיבה / צל/ מקלחות חצי סגורות / מטבחון</text:span><text:span text:style-name="T199"><text:s/>/</text:span><text:span text:style-name="T200">שירותים</text:span><text:span text:style-name="T201"><text:s/></text:span><text:span text:style-name="T202">וכמובן מבחר של ציוד<text:s/></text:span><text:span text:style-name="T203">גלישה</text:span><text:span text:style-name="T204"><text:s/>רחב שכל אחד ימצא את המתאים לו.</text:span></text:p>
      <text:p text:style-name="P205"><text:span text:style-name="T206">ברמה<text:s/></text:span><text:span text:style-name="T207">המשפטית</text:span></text:p>
      <text:p text:style-name="P208">יש לעמותה עו"ד בהתנדבות למידת הצורך</text:p>
      <text:p text:style-name="P209">כנ"ל העמותה מאורגנת בהתנהולתה<text:s/></text:p>
      <text:p text:style-name="P210"><text:span text:style-name="T211">ביטוחים /כיבוי אש/ עזרה ראשונה /הסמכות/הנ"ח/השתלמויות</text:span></text:p>
      <text:p text:style-name="P212"><text:span text:style-name="T213">העמותה</text:span><text:span text:style-name="T214"><text:s/>מציעה שירותים בעלויות מבוקרות<text:s/></text:span><text:span text:style-name="T215">שמטרתם</text:span><text:span text:style-name="T216"><text:s/>לספק את הצרכים הכלכליים של<text:s/></text:span><text:span text:style-name="T217">העמותה</text:span><text:span text:style-name="T218"><text:s/></text:span></text:p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rl-tb" fo:margin-bottom="0.1111in" fo:line-height="105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כותרת1" style:display-name="כותרת 1" style:family="paragraph" style:parent-style-name="רגיל" style:next-style-name="רגיל" style:default-outline-level="1">
      <style:paragraph-properties fo:keep-with-next="always" fo:keep-together="always" fo:margin-top="0.2222in" fo:margin-bottom="0.0277in"/>
      <style:text-properties style:font-name="Calibri Light" style:font-name-asian="Times New Roman" style:font-name-complex="Times New Roman" fo:font-weight="bold" style:font-weight-asian="bold" style:font-weight-complex="bold" fo:text-transform="uppercase" fo:letter-spacing="0.0027in" fo:font-size="14pt" style:font-size-asian="14pt" style:font-size-complex="14pt" fo:hyphenate="true"/>
    </style:style>
    <style:style style:name="כותרת2" style:display-name="כותרת 2" style:family="paragraph" style:parent-style-name="רגיל" style:next-style-name="רגיל" style:default-outline-level="2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כותרת3" style:display-name="כותרת 3" style:family="paragraph" style:parent-style-name="רגיל" style:next-style-name="רגיל" style:default-outline-level="3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letter-spacing="0.0027in" fo:font-size="12pt" style:font-size-asian="12pt" style:font-size-complex="12pt" fo:hyphenate="true"/>
    </style:style>
    <style:style style:name="כותרת4" style:display-name="כותרת 4" style:family="paragraph" style:parent-style-name="רגיל" style:next-style-name="רגיל" style:default-outline-level="4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 fo:hyphenate="true"/>
    </style:style>
    <style:style style:name="כותרת5" style:display-name="כותרת 5" style:family="paragraph" style:parent-style-name="רגיל" style:next-style-name="רגיל" style:default-outline-level="5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hyphenate="true"/>
    </style:style>
    <style:style style:name="כותרת6" style:display-name="כותרת 6" style:family="paragraph" style:parent-style-name="רגיל" style:next-style-name="רגיל" style:default-outline-level="6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hyphenate="true"/>
    </style:style>
    <style:style style:name="כותרת7" style:display-name="כותרת 7" style:family="paragraph" style:parent-style-name="רגיל" style:next-style-name="רגיל" style:default-outline-level="7">
      <style:paragraph-properties fo:keep-with-next="always" fo:keep-together="always" fo:margin-top="0.0833in" fo:margin-bottom="0in"/>
      <style:text-properties fo:font-style="italic" style:font-style-asian="italic" style:font-style-complex="italic" fo:hyphenate="true"/>
    </style:style>
    <style:style style:name="כותרת8" style:display-name="כותרת 8" style:family="paragraph" style:parent-style-name="רגיל" style:next-style-name="רגיל" style:default-outline-level="8">
      <style:paragraph-properties fo:keep-with-next="always" fo:keep-together="always" fo:margin-top="0.0833in" fo:margin-bottom="0in"/>
      <style:text-properties fo:font-weight="bold" style:font-weight-asian="bold" style:font-weight-complex="bold" fo:hyphenate="true"/>
    </style:style>
    <style:style style:name="כותרת9" style:display-name="כותרת 9" style:family="paragraph" style:parent-style-name="רגיל" style:next-style-name="רגיל" style:default-outline-level="9">
      <style:paragraph-properties fo:keep-with-next="always" fo:keep-together="always" fo:margin-top="0.0833in" fo:margin-bottom="0in"/>
      <style:text-properties fo:font-style="italic" style:font-style-asian="italic" style:font-style-complex="italic" fo:hyphenate="true"/>
    </style:style>
    <style:style style:name="רגיל" style:display-name="רגיל" style:family="paragraph">
      <style:text-properties fo:hyphenate="true"/>
    </style:style>
    <style:style style:name="גופןברירתהמחדלשלפיסקה" style:display-name="גופן ברירת המחדל של פיסקה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רשימה" style:display-name="רשימה" style:family="paragraph" style:parent-style-name="Textbody">
      <style:text-properties fo:font-size="12pt" style:font-size-asian="12pt" fo:hyphenate="false"/>
    </style:style>
    <style:style style:name="כיתוב" style:display-name="כיתוב" style:family="paragraph" style:parent-style-name="רגיל" style:next-style-name="רגיל">
      <style:text-properties fo:font-weight="bold" style:font-weight-asian="bold" style:font-weight-complex="bold" fo:font-size="9pt" style:font-size-asian="9pt" style:font-size-complex="9pt" fo:hyphenate="tru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כותרתטקסט" style:display-name="כותרת טקסט" style:family="paragraph" style:parent-style-name="רגיל" style:next-style-name="רגיל">
      <style:paragraph-properties fo:text-align="center" fo:margin-bottom="0in" fo:line-height="100%"/>
      <style:text-properties style:font-name="Calibri Light" style:font-name-asian="Times New Roman" style:font-name-complex="Times New Roman" fo:font-weight="bold" style:font-weight-asian="bold" style:font-weight-complex="bold" fo:letter-spacing="-0.0048in" fo:font-size="24pt" style:font-size-asian="24pt" style:font-size-complex="24pt" fo:hyphenate="true"/>
    </style:style>
    <style:style style:name="כותרתמשנה" style:display-name="כותרת משנה" style:family="paragraph" style:parent-style-name="רגיל" style:next-style-name="רגיל">
      <style:paragraph-properties fo:text-align="center" fo:margin-bottom="0.1666in"/>
      <style:text-properties style:font-name="Calibri Light" style:font-name-asian="Times New Roman" style:font-name-complex="Times New Roman" fo:font-size="12pt" style:font-size-asian="12pt" style:font-size-complex="12pt" fo:hyphenate="true"/>
    </style:style>
    <style:style style:name="כותרתתחתונה" style:display-name="כותרת תחתונה" style:family="paragraph" style:parent-style-name="Standard">
      <style:text-properties fo:hyphenate="false"/>
    </style:style>
    <style:style style:name="ListLabel1" style:display-name="ListLabel 1" style:family="text">
      <style:text-properties style:font-name="Calibri" style:font-name-asian="Calibri" style:font-name-complex="Calibri" fo:font-weight="bold" style:font-weight-asian="bold" fo:color="#1155CC" fo:font-size="14pt" style:font-size-asian="14pt" style:font-size-complex="14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style:font-name-complex="Mangal" style:font-size-complex="10pt" fo:hyphenate="true"/>
    </style:style>
    <style:style style:name="כותרת1תו" style:display-name="כותרת 1 תו" style:family="text" style:parent-style-name="גופןברירתהמחדלשלפיסקה">
      <style:text-properties style:font-name="Calibri Light" style:font-name-asian="Times New Roman" style:font-name-complex="Times New Roman" fo:font-weight="bold" style:font-weight-asian="bold" style:font-weight-complex="bold" fo:text-transform="uppercase" fo:letter-spacing="0.0027in" fo:font-size="14pt" style:font-size-asian="14pt" style:font-size-complex="14pt"/>
    </style:style>
    <style:style style:name="כותרת2תו" style:display-name="כותרת 2 תו" style:family="text" style:parent-style-name="גופןברירתהמחדלשלפיסקה">
      <style:text-properties style:font-name="Calibri Light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כותרת3תו" style:display-name="כותרת 3 תו" style:family="text" style:parent-style-name="גופןברירתהמחדלשלפיסקה">
      <style:text-properties style:font-name="Calibri Light" style:font-name-asian="Times New Roman" style:font-name-complex="Times New Roman" fo:letter-spacing="0.0027in" fo:font-size="12pt" style:font-size-asian="12pt" style:font-size-complex="12pt"/>
    </style:style>
    <style:style style:name="כותרת4תו" style:display-name="כותרת 4 תו" style:family="text" style:parent-style-name="גופןברירתהמחדלשלפיסקה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כותרת5תו" style:display-name="כותרת 5 תו" style:family="text" style:parent-style-name="גופןברירתהמחדלשלפיסקה">
      <style:text-properties style:font-name="Calibri Light" style:font-name-asian="Times New Roman" style:font-name-complex="Times New Roman" fo:font-weight="bold" style:font-weight-asian="bold" style:font-weight-complex="bold"/>
    </style:style>
    <style:style style:name="כותרת6תו" style:display-name="כותרת 6 תו" style:family="text" style:parent-style-name="גופןברירתהמחדלשלפיסקה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כותרת7תו" style:display-name="כותרת 7 תו" style:family="text" style:parent-style-name="גופןברירתהמחדלשלפיסקה">
      <style:text-properties fo:font-style="italic" style:font-style-asian="italic" style:font-style-complex="italic"/>
    </style:style>
    <style:style style:name="כותרת8תו" style:display-name="כותרת 8 תו" style:family="text" style:parent-style-name="גופןברירתהמחדלשלפיסקה">
      <style:text-properties fo:font-weight="bold" style:font-weight-asian="bold" style:font-weight-complex="bold"/>
    </style:style>
    <style:style style:name="כותרת9תו" style:display-name="כותרת 9 תו" style:family="text" style:parent-style-name="גופןברירתהמחדלשלפיסקה">
      <style:text-properties fo:font-style="italic" style:font-style-asian="italic" style:font-style-complex="italic"/>
    </style:style>
    <style:style style:name="כותרתטקסטתו" style:display-name="כותרת טקסט תו" style:family="text" style:parent-style-name="גופןברירתהמחדלשלפיסקה">
      <style:text-properties style:font-name="Calibri Light" style:font-name-asian="Times New Roman" style:font-name-complex="Times New Roman" fo:font-weight="bold" style:font-weight-asian="bold" style:font-weight-complex="bold" fo:letter-spacing="-0.0048in" fo:font-size="24pt" style:font-size-asian="24pt" style:font-size-complex="24pt"/>
    </style:style>
    <style:style style:name="כותרתמשנהתו" style:display-name="כותרת משנה תו" style:family="text" style:parent-style-name="גופןברירתהמחדלשלפיסקה">
      <style:text-properties style:font-name="Calibri Light" style:font-name-asian="Times New Roman" style:font-name-complex="Times New Roman" fo:font-size="12pt" style:font-size-asian="12pt" style:font-size-complex="12pt"/>
    </style:style>
    <style:style style:name="חזק" style:display-name="חזק" style:family="text" style:parent-style-name="גופןברירתהמחדלשלפיסקה">
      <style:text-properties fo:font-weight="bold" style:font-weight-asian="bold" style:font-weight-complex="bold" style:use-window-font-color="true"/>
    </style:style>
    <style:style style:name="הדגשה" style:display-name="הדגשה" style:family="text" style:parent-style-name="גופןברירתהמחדלשלפיסקה">
      <style:text-properties fo:font-style="italic" style:font-style-asian="italic" style:font-style-complex="italic" style:use-window-font-color="true"/>
    </style:style>
    <style:style style:name="ללאמרווח" style:display-name="ללא מרווח" style:family="paragraph">
      <style:paragraph-properties fo:margin-bottom="0in" fo:line-height="100%"/>
      <style:text-properties fo:hyphenate="true"/>
    </style:style>
    <style:style style:name="ציטוט" style:display-name="ציטוט" style:family="paragraph" style:parent-style-name="רגיל" style:next-style-name="רגיל">
      <style:paragraph-properties fo:text-align="center" fo:margin-top="0.1388in" fo:line-height="110%" fo:margin-left="0.6in" fo:margin-right="0.6in">
        <style:tab-stops/>
      </style:paragraph-properties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 fo:hyphenate="true"/>
    </style:style>
    <style:style style:name="ציטוטתו" style:display-name="ציטוט תו" style:family="text" style:parent-style-name="גופןברירתהמחדלשלפיסקה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ציטוטחזק" style:display-name="ציטוט חזק" style:family="paragraph" style:parent-style-name="רגיל" style:next-style-name="רגיל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style:font-name-asian="Times New Roman" style:font-name-complex="Times New Roman" fo:font-size="13pt" style:font-size-asian="13pt" style:font-size-complex="13pt" fo:hyphenate="true"/>
    </style:style>
    <style:style style:name="ציטוטחזקתו" style:display-name="ציטוט חזק תו" style:family="text" style:parent-style-name="גופןברירתהמחדלשלפיסקה">
      <style:text-properties style:font-name="Calibri Light" style:font-name-asian="Times New Roman" style:font-name-complex="Times New Roman" fo:font-size="13pt" style:font-size-asian="13pt" style:font-size-complex="13pt"/>
    </style:style>
    <style:style style:name="הדגשהעדינה" style:display-name="הדגשה עדינה" style:family="text" style:parent-style-name="גופןברירתהמחדלשלפיסקה">
      <style:text-properties fo:font-style="italic" style:font-style-asian="italic" style:font-style-complex="italic" style:use-window-font-color="true"/>
    </style:style>
    <style:style style:name="הדגשהחזקה" style:display-name="הדגשה חזקה" style:family="text" style:parent-style-name="גופןברירתהמחדלשלפיסקה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הפניהעדינה" style:display-name="הפניה עדינה" style:family="text" style:parent-style-name="גופןברירתהמחדלשלפיסקה">
      <style:text-properties fo:font-variant="small-caps" style:use-window-font-color="true" style:text-underline-type="single" style:text-underline-style="solid" style:text-underline-width="auto" style:text-underline-mode="continuous" style:text-underline-color="#7F7F7F"/>
    </style:style>
    <style:style style:name="הפניהחזקה" style:display-name="הפניה חזקה" style:family="text" style:parent-style-name="גופןברירתהמחדלשלפיסקה">
      <style:text-properties fo:font-weight="bold" style:font-weight-asian="bold" style:font-weight-complex="bold" fo:font-variant="small-caps" style:use-window-font-color="true" style:text-underline-type="single" style:text-underline-style="solid" style:text-underline-width="auto" style:text-underline-mode="continuous"/>
    </style:style>
    <style:style style:name="כותרהספר" style:display-name="כותר הספר" style:family="text" style:parent-style-name="גופןברירתהמחדלשלפיסקה">
      <style:text-properties fo:font-weight="bold" style:font-weight-asian="bold" style:font-weight-complex="bold" fo:font-variant="small-caps" style:use-window-font-color="true"/>
    </style:style>
    <style:style style:name="כותרתתוכןעניינים" style:display-name="כותרת תוכן עניינים" style:family="paragraph" style:parent-style-name="כותרת1" style:next-style-name="רגיל">
      <style:text-properties fo:hyphenate="true"/>
    </style:style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style:font-name-complex="Mangal" style:font-size-complex="9.5pt" fo:hyphenate="true"/>
    </style:style>
    <style:style style:name="כותרתעליונהתו" style:display-name="כותרת עליונה תו" style:family="text" style:parent-style-name="גופןברירתהמחדלשלפיסקה">
      <style:text-properties style:font-name-complex="Mangal" style:font-size-complex="9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גופןברירתהמחדלשלפיסקה" style:family="text">
      <style:text-properties style:font-name-complex="Times New Roman" fo:font-weight="bold" style:font-weight-asian="bold" style:font-weight-complex="bold" style:font-size-complex="11pt" style:text-underline-type="single" style:text-underline-style="solid" style:text-underline-width="auto" style:text-underline-mode="continuous" style:language-complex="he" style:country-complex="IL"/>
    </style:style>
    <style:style style:name="T3" style:parent-style-name="גופןברירתהמחדלשלפיסקה" style:family="text">
      <style:text-properties style:font-name-complex="Times New Roman" fo:font-weight="bold" style:font-weight-asian="bold" style:font-weight-complex="bold" style:font-size-complex="11pt" style:text-underline-type="single" style:text-underline-style="solid" style:text-underline-width="auto" style:text-underline-mode="continuous" style:language-complex="he" style:country-complex="IL"/>
    </style:style>
    <style:style style:name="P4" style:parent-style-name="Standard" style:family="paragraph">
      <style:paragraph-properties fo:text-align="end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text-align="end"/>
    </style:style>
    <style:style style:name="T6" style:parent-style-name="גופןברירתהמחדלשלפיסקה" style:family="text">
      <style:text-properties style:language-complex="he" style:country-complex="IL"/>
    </style:style>
    <style:style style:name="P7" style:parent-style-name="Standard" style:family="paragraph">
      <style:paragraph-properties fo:text-align="end"/>
    </style:style>
    <style:style style:name="T8" style:parent-style-name="גופןברירתהמחדלשלפיסקה" style:family="text">
      <style:text-properties style:font-name="Calibri" style:font-name-asian="Calibri" style:font-name-complex="Calibri" fo:font-weight="bold" style:font-weight-asian="bold" fo:font-size="12pt" style:font-size-asian="12pt" style:font-size-complex="12pt" style:language-complex="he" style:country-complex="IL"/>
    </style:style>
    <style:style style:name="T9" style:parent-style-name="גופןברירתהמחדלשלפיסקה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כותרתעליונה"><text:span text:style-name="T2">‏מאי</text:span><text:span text:style-name="T3"><text:s/>24</text:span></text:p>
      </style:header>
      <style:footer>
        <text:p text:style-name="P4"/>
        <text:p text:style-name="P5"><text:span text:style-name="T6"><draw:custom-shape svg:x="0in" svg:y="0in" svg:width="0in" svg:height="0.02014in" draw:id="id0" draw:style-name="a0" draw:name="מלבן 1" text:anchor-type="as-char"><svg:title/><svg:desc/><text:p text:style-name="רגיל"/><draw:enhanced-geometry draw:type="non-primitive" svg:viewBox="0 0 21600 21600" draw:enhanced-path="M 0 0 L 21600 0 21600 21600 0 21600 Z N"/></draw:custom-shape></text:span></text:p>
        <text:p text:style-name="P7"><text:span text:style-name="T8"><text:s text:c="9"/>רעותה | מהכי עמוק להכי רחוק <text:s/>| 050-2000224 |<text:s/></text:span><text:span text:style-name="T9">reuta.co.il | reutyosefgmail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4-06-04T12:12:00Z</meta:creation-date>
    <dc:date>2024-06-04T12:12:00Z</dc:date>
    <meta:print-date>2024-06-01T06:23:00Z</meta:print-date>
    <meta:template xlink:href="Normal" xlink:type="simple"/>
    <meta:editing-cycles>2</meta:editing-cycles>
    <meta:editing-duration>PT60S</meta:editing-duration>
    <meta:document-statistic meta:page-count="5" meta:paragraph-count="7" meta:word-count="583" meta:character-count="3905" meta:row-count="27" meta:non-whitespace-character-count="3329"/>
  </office:meta>
</office:document-meta>
</file>